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line-height="115%" fo:text-align="center" style:justify-single-word="false" fo:text-indent="0cm" style:auto-text-indent="false"/>
      <style:text-properties style:font-name="Arial" fo:font-size="16pt" fo:font-weight="normal" officeooo:rsid="00036eaa" officeooo:paragraph-rsid="00036ea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2.501cm" fo:line-height="115%" fo:text-align="center" style:justify-single-word="false" fo:text-indent="0cm" style:auto-text-indent="false"/>
      <style:text-properties style:font-name="Arial" fo:font-weight="normal" officeooo:rsid="0003169b" officeooo:paragraph-rsid="0003169b" style:font-weight-asian="normal" style:font-weight-complex="normal"/>
    </style:style>
    <style:style style:name="T1" style:family="text">
      <style:text-properties officeooo:rsid="00050355"/>
    </style:style>
    <style:style style:name="T2" style:family="text">
      <style:text-properties officeooo:rsid="00057eb2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Unidad II</text:p>
      <text:p text:style-name="P2">Sistema: Reysa UI – Sistema de Gestión para Taller Automotriz</text:p>
      <text:p text:style-name="P2">Nombre de la materia: Interacción Humano Máquina<text:span text:style-name="T1">e</text:span></text:p>
      <text:p text:style-name="P2">Institución: Universidad Autónoma de Baja California Sur (UABCS)</text:p>
      <text:p text:style-name="P2">Profesor: IVAN ALEXIS COTA ESPINOSA</text:p>
      <text:p text:style-name="P2">Alumno: <text:span text:style-name="T2">Francisco Javier Geraldo Geraldo</text:span></text:p>
      <text:p text:style-name="P2">Fecha de entrega: 7/05/2026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1:38:03.686925154</meta:creation-date>
    <dc:date>2026-05-07T12:55:45.434968223</dc:date>
    <meta:editing-duration>PT19M33S</meta:editing-duration>
    <meta:editing-cycles>3</meta:editing-cycles>
    <meta:generator>LibreOffice/25.8.6.2$Linux_X86_64 LibreOffice_project/a46b460d1686bb49c718d2ef5f88b83ff2dc4981</meta:generator>
    <meta:document-statistic meta:table-count="0" meta:image-count="0" meta:object-count="0" meta:page-count="1" meta:paragraph-count="7" meta:word-count="41" meta:character-count="292" meta:non-whitespace-character-count="257"/>
  </office:meta>
</office:document-meta>
</file>