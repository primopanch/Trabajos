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5000002E7F7463373.jpg" manifest:media-type="image/jpeg"/>
  <manifest:file-entry manifest:full-path="Pictures/10000000000002DD000002A055561836.jpg" manifest:media-type="image/jpeg"/>
  <manifest:file-entry manifest:full-path="Pictures/1000000000000376000002745D8FE709.jpg" manifest:media-type="image/jpeg"/>
  <manifest:file-entry manifest:full-path="Pictures/1000000000000436000002FA9AC9518A.jpg" manifest:media-type="image/jpeg"/>
  <manifest:file-entry manifest:full-path="Pictures/100000000000037700000273D49AC99B.jpg" manifest:media-type="image/jpeg"/>
  <manifest:file-entry manifest:full-path="Pictures/10000000000003790000027B120BBAAE.jpg" manifest:media-type="image/jpeg"/>
  <manifest:file-entry manifest:full-path="Pictures/100000000000037700000274AFAC750F.jpg" manifest:media-type="image/jpeg"/>
  <manifest:file-entry manifest:full-path="Pictures/10000000000001DA0000009D9504392C.jpg" manifest:media-type="image/jpeg"/>
  <manifest:file-entry manifest:full-path="Pictures/10000000000000C8000000B4546B3A7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10.425cm" fo:margin-right="-1.588cm" fo:margin-top="0cm" fo:margin-bottom="0.552cm" style:contextual-spacing="false" fo:line-height="107%" fo:text-indent="0cm" style:auto-text-indent="false" style:page-number="auto" fo:break-before="page">
        <style:tab-stops/>
      </style:paragraph-properties>
      <style:text-properties officeooo:paragraph-rsid="0017fd9c"/>
    </style:style>
    <style:style style:name="P2" style:family="paragraph">
      <style:paragraph-properties fo:margin-left="0cm" fo:margin-right="0cm" fo:margin-top="0cm" fo:margin-bottom="0.282cm" fo:line-height="107%" fo:text-indent="0cm" loext:tab-stop-distance="0cm">
        <style:tab-stops/>
      </style:paragraph-properties>
    </style:style>
    <style:style style:name="P3" style:family="paragraph">
      <loext:graphic-properties draw:fill="none"/>
      <style:paragraph-properties style:writing-mode="lr-tb" style:font-independent-line-spacing="false"/>
    </style:style>
    <style:style style:name="P4" style:family="paragraph">
      <loext:graphic-properties draw:fill="none"/>
    </style:style>
    <style:style style:name="P5" style:family="paragraph" style:parent-style-name="Normal">
      <style:paragraph-properties fo:margin-left="0cm" fo:margin-right="-1.588cm" fo:margin-top="0cm" fo:margin-bottom="0.552cm" style:contextual-spacing="false" fo:line-height="107%" fo:text-indent="0cm" style:auto-text-indent="false">
        <style:tab-stops/>
      </style:paragraph-properties>
      <style:text-properties officeooo:paragraph-rsid="0017fd9c"/>
    </style:style>
    <style:style style:name="P6" style:family="paragraph" style:parent-style-name="Normal">
      <style:paragraph-properties fo:margin-left="0cm" fo:margin-right="-1.588cm" fo:margin-top="0cm" fo:margin-bottom="0.552cm" style:contextual-spacing="false" fo:line-height="107%" fo:text-align="center" style:justify-single-word="false" fo:text-indent="0cm" style:auto-text-indent="false">
        <style:tab-stops/>
      </style:paragraph-properties>
      <style:text-properties officeooo:paragraph-rsid="0017fd9c"/>
    </style:style>
    <style:style style:name="P7" style:family="paragraph" style:parent-style-name="Normal">
      <style:paragraph-properties fo:margin-left="-0.009cm" fo:margin-top="0cm" fo:margin-bottom="0.547cm" style:contextual-spacing="false" fo:text-align="center" style:justify-single-word="false">
        <style:tab-stops/>
      </style:paragraph-properties>
    </style:style>
    <style:style style:name="P8" style:family="paragraph" style:parent-style-name="Normal">
      <style:paragraph-properties fo:margin-left="-0.009cm" fo:margin-top="0cm" fo:margin-bottom="0.568cm" style:contextual-spacing="false" fo:text-align="center" style:justify-single-word="false">
        <style:tab-stops/>
      </style:paragraph-properties>
    </style:style>
    <style:style style:name="P9" style:family="paragraph" style:parent-style-name="Normal">
      <style:paragraph-properties fo:margin-left="0cm" fo:margin-top="0cm" fo:margin-bottom="0.563cm" style:contextual-spacing="false" fo:line-height="107%" fo:text-align="center" style:justify-single-word="false" fo:text-indent="0cm" style:auto-text-indent="false">
        <style:tab-stops/>
      </style:paragraph-properties>
    </style:style>
    <style:style style:name="P10" style:family="paragraph" style:parent-style-name="Normal">
      <style:paragraph-properties fo:margin-left="-0.009cm" fo:text-align="center" style:justify-single-word="false">
        <style:tab-stops/>
      </style:paragraph-properties>
    </style:style>
    <style:style style:name="P11" style:family="paragraph" style:parent-style-name="Heading_20_1">
      <style:paragraph-properties fo:margin-left="-0.009cm">
        <style:tab-stops/>
      </style:paragraph-properties>
    </style:style>
    <style:style style:name="P12" style:family="paragraph" style:parent-style-name="Normal">
      <style:paragraph-properties fo:margin-left="-0.009cm" fo:margin-top="0cm" fo:margin-bottom="0.423cm" style:contextual-spacing="false" fo:line-height="150%">
        <style:tab-stops/>
      </style:paragraph-properties>
    </style:style>
    <style:style style:name="P13" style:family="paragraph" style:parent-style-name="Normal">
      <style:paragraph-properties fo:margin-left="-0.009cm" fo:margin-top="0cm" fo:margin-bottom="1.21cm" style:contextual-spacing="false" fo:line-height="150%">
        <style:tab-stops/>
      </style:paragraph-properties>
    </style:style>
    <style:style style:name="P14" style:family="paragraph" style:parent-style-name="Normal">
      <style:paragraph-properties fo:margin-left="0cm" fo:margin-top="0cm" fo:margin-bottom="1.238cm" style:contextual-spacing="false" fo:line-height="107%" fo:text-indent="0cm" style:auto-text-indent="false">
        <style:tab-stops/>
      </style:paragraph-properties>
    </style:style>
    <style:style style:name="P15" style:family="paragraph" style:parent-style-name="Normal">
      <style:paragraph-properties fo:margin-left="0cm" fo:margin-top="0cm" fo:margin-bottom="0cm" style:contextual-spacing="false" fo:line-height="107%" fo:text-indent="0cm" style:auto-text-indent="false">
        <style:tab-stops/>
      </style:paragraph-properties>
    </style:style>
    <style:style style:name="P16" style:family="paragraph" style:parent-style-name="Heading_20_1">
      <style:paragraph-properties fo:margin-left="-0.009cm" fo:margin-top="0cm" fo:margin-bottom="1.028cm" style:contextual-spacing="false">
        <style:tab-stops/>
      </style:paragraph-properties>
    </style:style>
    <style:style style:name="P17" style:family="paragraph" style:parent-style-name="Heading_20_2">
      <style:paragraph-properties fo:margin-left="-0.009cm">
        <style:tab-stops/>
      </style:paragraph-properties>
    </style:style>
    <style:style style:name="P18" style:family="paragraph" style:parent-style-name="Normal">
      <style:paragraph-properties fo:margin-left="-0.009cm" fo:margin-top="0cm" fo:margin-bottom="0.801cm" style:contextual-spacing="false" fo:line-height="150%">
        <style:tab-stops/>
      </style:paragraph-properties>
    </style:style>
    <style:style style:name="P19" style:family="paragraph" style:parent-style-name="Normal">
      <style:paragraph-properties fo:margin-left="-0.009cm" fo:margin-top="0cm" fo:margin-bottom="0.617cm" style:contextual-spacing="false">
        <style:tab-stops/>
      </style:paragraph-properties>
    </style:style>
    <style:style style:name="P20" style:family="paragraph" style:parent-style-name="Normal" style:list-style-name="L1">
      <style:paragraph-properties fo:text-indent="-0.635cm" style:auto-text-indent="false"/>
    </style:style>
    <style:style style:name="P21" style:family="paragraph" style:parent-style-name="Normal" style:list-style-name="L1">
      <style:paragraph-properties fo:margin-top="0cm" fo:margin-bottom="0.995cm" style:contextual-spacing="false" fo:text-indent="-0.635cm" style:auto-text-indent="false"/>
    </style:style>
    <style:style style:name="P22" style:family="paragraph" style:parent-style-name="Normal">
      <style:paragraph-properties fo:margin-left="-0.009cm" fo:line-height="150%">
        <style:tab-stops/>
      </style:paragraph-properties>
    </style:style>
    <style:style style:name="P23" style:family="paragraph" style:parent-style-name="Normal" style:list-style-name="L2">
      <style:paragraph-properties fo:text-indent="-0.635cm" style:auto-text-indent="false"/>
    </style:style>
    <style:style style:name="P24" style:family="paragraph" style:parent-style-name="Normal" style:list-style-name="L2">
      <style:paragraph-properties fo:margin-top="0cm" fo:margin-bottom="0.617cm" style:contextual-spacing="false" fo:text-indent="-0.635cm" style:auto-text-indent="false"/>
    </style:style>
    <style:style style:name="P25" style:family="paragraph" style:parent-style-name="Normal">
      <style:paragraph-properties fo:margin-left="-2.143cm" fo:margin-right="-2.064cm" fo:margin-top="0cm" fo:margin-bottom="0.549cm" style:contextual-spacing="false" fo:line-height="107%" fo:text-indent="0cm" style:auto-text-indent="false">
        <style:tab-stops/>
      </style:paragraph-properties>
    </style:style>
    <style:style style:name="P26" style:family="paragraph" style:parent-style-name="Heading_20_1">
      <style:paragraph-properties fo:margin-left="0.875cm" fo:margin-top="0cm" fo:margin-bottom="0.817cm" style:contextual-spacing="false" fo:text-indent="-0.901cm" style:auto-text-indent="false">
        <style:tab-stops/>
      </style:paragraph-properties>
    </style:style>
    <style:style style:name="P27" style:family="paragraph" style:parent-style-name="Normal">
      <style:paragraph-properties fo:margin-left="-0.009cm">
        <style:tab-stops/>
      </style:paragraph-properties>
    </style:style>
    <style:style style:name="P28" style:family="paragraph" style:parent-style-name="Normal">
      <style:paragraph-properties fo:margin-left="-0.009cm" fo:margin-right="3.069cm" fo:margin-top="0cm" fo:margin-bottom="0.721cm" style:contextual-spacing="false">
        <style:tab-stops/>
      </style:paragraph-properties>
    </style:style>
    <style:style style:name="P29" style:family="paragraph" style:parent-style-name="Normal">
      <style:paragraph-properties fo:margin-left="0cm" fo:margin-right="3.069cm" fo:margin-top="0cm" fo:margin-bottom="0.716cm" style:contextual-spacing="false" fo:line-height="107%" fo:text-indent="0cm" style:auto-text-indent="false">
        <style:tab-stops/>
      </style:paragraph-properties>
    </style:style>
    <style:style style:name="P30" style:family="paragraph" style:parent-style-name="Heading_20_3">
      <style:paragraph-properties fo:margin-left="-0.009cm" fo:margin-right="3.889cm">
        <style:tab-stops/>
      </style:paragraph-properties>
    </style:style>
    <style:style style:name="P31" style:family="paragraph" style:parent-style-name="Normal" style:list-style-name="L3">
      <style:paragraph-properties fo:text-indent="-0.635cm" style:auto-text-indent="false"/>
    </style:style>
    <style:style style:name="P32" style:family="paragraph" style:parent-style-name="Normal" style:list-style-name="L3">
      <style:paragraph-properties fo:margin-top="0cm" fo:margin-bottom="0.721cm" style:contextual-spacing="false" fo:text-indent="-0.635cm" style:auto-text-indent="false"/>
    </style:style>
    <style:style style:name="P33" style:family="paragraph" style:parent-style-name="Normal">
      <style:paragraph-properties fo:margin-left="-0.009cm" fo:margin-right="3.889cm" fo:margin-top="0cm" fo:margin-bottom="0.612cm" style:contextual-spacing="false" fo:line-height="107%">
        <style:tab-stops/>
      </style:paragraph-properties>
    </style:style>
    <style:style style:name="P34" style:family="paragraph" style:parent-style-name="Normal">
      <style:paragraph-properties fo:margin-left="0.653cm" fo:margin-top="0cm" fo:margin-bottom="0.995cm" style:contextual-spacing="false">
        <style:tab-stops/>
      </style:paragraph-properties>
    </style:style>
    <style:style style:name="P35" style:family="paragraph" style:parent-style-name="Normal">
      <style:paragraph-properties fo:margin-left="-0.009cm" fo:margin-top="0cm" fo:margin-bottom="0.39cm" style:contextual-spacing="false">
        <style:tab-stops/>
      </style:paragraph-properties>
    </style:style>
    <style:style style:name="P36" style:family="paragraph" style:parent-style-name="Normal">
      <style:paragraph-properties fo:margin-left="3.889cm" fo:margin-top="0cm" fo:margin-bottom="0cm" style:contextual-spacing="false" fo:line-height="107%" fo:text-indent="0cm" style:auto-text-indent="false">
        <style:tab-stops/>
      </style:paragraph-properties>
    </style:style>
    <style:style style:name="P37" style:family="paragraph" style:parent-style-name="Normal" style:list-style-name="L4">
      <style:paragraph-properties fo:text-indent="-0.635cm" style:auto-text-indent="false"/>
    </style:style>
    <style:style style:name="P38" style:family="paragraph" style:parent-style-name="Normal" style:list-style-name="L4">
      <style:paragraph-properties fo:margin-top="0cm" fo:margin-bottom="0.995cm" style:contextual-spacing="false" fo:text-indent="-0.635cm" style:auto-text-indent="false"/>
    </style:style>
    <style:style style:name="P39" style:family="paragraph" style:parent-style-name="Normal">
      <style:paragraph-properties fo:margin-left="-0.009cm" fo:margin-top="0cm" fo:margin-bottom="0cm" style:contextual-spacing="false">
        <style:tab-stops/>
      </style:paragraph-properties>
    </style:style>
    <style:style style:name="P40" style:family="paragraph" style:parent-style-name="Normal">
      <style:paragraph-properties fo:margin-left="2.937cm" fo:margin-top="0cm" fo:margin-bottom="0cm" style:contextual-spacing="false" fo:line-height="107%" fo:text-indent="0cm" style:auto-text-indent="false">
        <style:tab-stops/>
      </style:paragraph-properties>
    </style:style>
    <style:style style:name="P41" style:family="paragraph" style:parent-style-name="Normal" style:list-style-name="L5">
      <style:paragraph-properties fo:text-indent="-0.635cm" style:auto-text-indent="false"/>
    </style:style>
    <style:style style:name="P42" style:family="paragraph" style:parent-style-name="Normal" style:list-style-name="L5">
      <style:paragraph-properties fo:margin-top="0cm" fo:margin-bottom="0.995cm" style:contextual-spacing="false" fo:text-indent="-0.635cm" style:auto-text-indent="false"/>
    </style:style>
    <style:style style:name="P43" style:family="paragraph" style:parent-style-name="Normal">
      <style:paragraph-properties fo:margin-left="2.937cm" fo:margin-top="0cm" fo:margin-bottom="0.915cm" style:contextual-spacing="false" fo:line-height="107%" fo:text-indent="0cm" style:auto-text-indent="false">
        <style:tab-stops/>
      </style:paragraph-properties>
    </style:style>
    <style:style style:name="P44" style:family="paragraph" style:parent-style-name="Normal" style:list-style-name="L6">
      <style:paragraph-properties fo:text-indent="-0.635cm" style:auto-text-indent="false"/>
    </style:style>
    <style:style style:name="P45" style:family="paragraph" style:parent-style-name="Normal" style:list-style-name="L6">
      <style:paragraph-properties fo:margin-top="0cm" fo:margin-bottom="0.995cm" style:contextual-spacing="false" fo:text-indent="-0.635cm" style:auto-text-indent="false"/>
    </style:style>
    <style:style style:name="P46" style:family="paragraph" style:parent-style-name="Normal">
      <style:paragraph-properties fo:margin-left="0cm" fo:margin-top="0cm" fo:margin-bottom="0.924cm" style:contextual-spacing="false" fo:line-height="107%" fo:text-indent="0cm" style:auto-text-indent="false">
        <style:tab-stops/>
      </style:paragraph-properties>
    </style:style>
    <style:style style:name="P47" style:family="paragraph" style:parent-style-name="Normal">
      <style:paragraph-properties fo:margin-left="0cm" fo:margin-right="2.937cm" fo:margin-top="0cm" fo:margin-bottom="0.732cm" style:contextual-spacing="false" fo:line-height="107%" fo:text-indent="0cm" style:auto-text-indent="false">
        <style:tab-stops/>
      </style:paragraph-properties>
    </style:style>
    <style:style style:name="P48" style:family="paragraph" style:parent-style-name="Normal" style:list-style-name="L7">
      <style:paragraph-properties fo:text-indent="-0.635cm" style:auto-text-indent="false"/>
    </style:style>
    <style:style style:name="P49" style:family="paragraph" style:parent-style-name="Normal" style:list-style-name="L7">
      <style:paragraph-properties fo:margin-top="0cm" fo:margin-bottom="1.404cm" style:contextual-spacing="false" fo:text-indent="-0.635cm" style:auto-text-indent="false"/>
    </style:style>
    <style:style style:name="P50" style:family="paragraph" style:parent-style-name="Normal">
      <style:paragraph-properties fo:margin-left="-0.009cm" fo:margin-top="0cm" fo:margin-bottom="0.995cm" style:contextual-spacing="false">
        <style:tab-stops/>
      </style:paragraph-properties>
    </style:style>
    <style:style style:name="P51" style:family="paragraph" style:parent-style-name="Normal">
      <style:paragraph-properties fo:margin-left="-0.009cm" fo:margin-top="0cm" fo:margin-bottom="1.404cm" style:contextual-spacing="false">
        <style:tab-stops/>
      </style:paragraph-properties>
    </style:style>
    <style:style style:name="P52" style:family="paragraph" style:parent-style-name="Normal">
      <style:paragraph-properties fo:margin-left="-0.009cm" fo:margin-top="0cm" fo:margin-bottom="0.547cm" style:contextual-spacing="false" fo:line-height="107%">
        <style:tab-stops/>
      </style:paragraph-properties>
    </style:style>
    <style:style style:name="P53" style:family="paragraph" style:parent-style-name="Normal" style:list-style-name="L8">
      <style:paragraph-properties fo:text-indent="-0.635cm" style:auto-text-indent="false"/>
    </style:style>
    <style:style style:name="P54" style:family="paragraph" style:parent-style-name="Normal" style:list-style-name="L8">
      <style:paragraph-properties fo:margin-top="0cm" fo:margin-bottom="0.995cm" style:contextual-spacing="false" fo:text-indent="-0.635cm" style:auto-text-indent="false"/>
    </style:style>
    <style:style style:name="P55" style:family="paragraph" style:parent-style-name="Normal" style:list-style-name="L9">
      <style:paragraph-properties fo:text-indent="-0.635cm" style:auto-text-indent="false"/>
    </style:style>
    <style:style style:name="P56" style:family="paragraph" style:parent-style-name="Normal" style:list-style-name="L9">
      <style:paragraph-properties fo:margin-top="0cm" fo:margin-bottom="0.995cm" style:contextual-spacing="false" fo:text-indent="-0.635cm" style:auto-text-indent="false"/>
    </style:style>
    <style:style style:name="P57" style:family="paragraph" style:parent-style-name="Heading_20_1">
      <style:paragraph-properties fo:margin-left="-0.009cm" fo:margin-top="0cm" fo:margin-bottom="0.817cm" style:contextual-spacing="false">
        <style:tab-stops/>
      </style:paragraph-properties>
    </style:style>
    <style:style style:name="P58" style:family="paragraph" style:parent-style-name="Normal" style:list-style-name="L10">
      <style:paragraph-properties fo:text-indent="-0.635cm" style:auto-text-indent="false"/>
    </style:style>
    <style:style style:name="P59" style:family="paragraph" style:parent-style-name="Normal" style:list-style-name="L10">
      <style:paragraph-properties fo:margin-top="0cm" fo:margin-bottom="0.995cm" style:contextual-spacing="false" fo:text-indent="-0.635cm" style:auto-text-indent="false"/>
    </style:style>
    <style:style style:name="P60" style:family="paragraph" style:parent-style-name="Heading_20_2">
      <style:paragraph-properties fo:margin-left="-0.009cm" fo:margin-top="0cm" fo:margin-bottom="0.651cm" style:contextual-spacing="false">
        <style:tab-stops/>
      </style:paragraph-properties>
    </style:style>
    <style:style style:name="P61" style:family="paragraph" style:parent-style-name="Normal">
      <style:paragraph-properties fo:margin-left="-0.009cm" fo:margin-top="0cm" fo:margin-bottom="0.721cm" style:contextual-spacing="false">
        <style:tab-stops/>
      </style:paragraph-properties>
    </style:style>
    <style:style style:name="P62" style:family="paragraph" style:parent-style-name="Heading_20_1">
      <style:paragraph-properties fo:margin-left="0.875cm" fo:text-indent="-0.901cm" style:auto-text-indent="false">
        <style:tab-stops/>
      </style:paragraph-properties>
    </style:style>
    <style:style style:name="P63" style:family="paragraph" style:parent-style-name="Heading_20_1">
      <style:paragraph-properties fo:margin-left="1.326cm" fo:text-indent="-1.353cm" style:auto-text-indent="false">
        <style:tab-stops/>
      </style:paragraph-properties>
    </style:style>
    <style:style style:name="P64" style:family="paragraph" style:parent-style-name="Normal" style:list-style-name="L11">
      <style:paragraph-properties fo:text-indent="-0.635cm" style:auto-text-indent="false"/>
    </style:style>
    <style:style style:name="P65" style:family="paragraph" style:parent-style-name="Normal" style:list-style-name="L11">
      <style:paragraph-properties fo:margin-top="0cm" fo:margin-bottom="0.617cm" style:contextual-spacing="false" fo:text-indent="-0.635cm" style:auto-text-indent="false"/>
    </style:style>
    <style:style style:name="P66" style:family="paragraph" style:parent-style-name="Normal">
      <style:paragraph-properties fo:margin-left="0.212cm" fo:margin-top="0cm" fo:margin-bottom="0.69cm" style:contextual-spacing="false" fo:line-height="107%" fo:text-indent="0cm" style:auto-text-indent="false">
        <style:tab-stops/>
      </style:paragraph-properties>
    </style:style>
    <style:style style:name="P67" style:family="paragraph" style:parent-style-name="Normal">
      <style:paragraph-properties fo:margin-left="0cm" fo:margin-top="0cm" fo:margin-bottom="0.628cm" style:contextual-spacing="false" fo:line-height="107%" fo:text-indent="0cm" style:auto-text-indent="false">
        <style:tab-stops/>
      </style:paragraph-properties>
    </style:style>
    <style:style style:name="T1" style:family="text">
      <style:text-properties fo:font-family="Cambria" style:font-family-generic="roman" style:font-pitch="variable" fo:font-size="11pt" style:font-family-asian="Cambria" style:font-family-generic-asian="roman" style:font-pitch-asian="variable" style:font-size-asian="11pt" style:font-family-complex="Cambria" style:font-family-generic-complex="roman" style:font-pitch-complex="variable"/>
    </style:style>
    <style:style style:name="T2" style:family="text">
      <style:text-properties fo:color="#1f1f1f" loext:opacity="100%" style:font-name="Calibri" fo:font-size="18pt" fo:font-weight="bold" style:font-name-asian="Calibri" style:font-size-asian="18pt" style:font-weight-asian="bold" style:font-name-complex="Calibri" style:font-size-complex="18pt"/>
    </style:style>
    <style:style style:name="T3" style:family="text">
      <style:text-properties fo:color="#1f1f1f" loext:opacity="100%" style:font-name="Calibri" fo:font-size="18pt" style:font-name-asian="Calibri" style:font-size-asian="18pt" style:font-name-complex="Calibri" style:font-size-complex="18pt"/>
    </style:style>
    <style:style style:name="T4" style:family="text">
      <style:text-properties style:font-name="Calibri" fo:font-size="10.5pt" style:font-name-asian="Calibri" style:font-size-asian="10.5pt" style:font-name-complex="Calibri"/>
    </style:style>
    <style:style style:name="T5" style:family="text">
      <style:text-properties officeooo:rsid="0017fd9c"/>
    </style:style>
    <style:style style:name="T6" style:family="text">
      <style:text-properties fo:language="es" fo:country="MX"/>
    </style:style>
    <style:style style:name="T7" style:family="text">
      <style:text-properties fo:font-size="23pt" fo:font-weight="bold" style:font-size-asian="23pt" style:font-weight-asian="bold"/>
    </style:style>
    <style:style style:name="T8" style:family="text">
      <style:text-properties style:font-name="Calibri" fo:font-size="11pt" style:font-name-asian="Calibri" style:font-size-asian="11pt" style:font-name-complex="Calibri"/>
    </style:style>
    <style:style style:name="T9" style:family="text">
      <style:text-properties fo:font-weight="bold" style:font-weight-asian="bold"/>
    </style:style>
    <style:style style:name="T10" style:family="text">
      <style:text-properties fo:font-size="13pt" fo:font-weight="bold" style:font-size-asian="13pt" style:font-weight-asian="bold"/>
    </style:style>
    <style:style style:name="T11" style:family="text">
      <style:text-properties fo:font-size="17pt" fo:font-weight="bold" style:font-size-asian="17pt"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1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1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1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2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2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2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2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2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8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8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8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8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8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8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8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9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9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9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9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9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9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9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0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10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10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0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10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10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0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10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1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11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1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1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11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1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1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11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none" style:mirror="none" loext:decorative="false" style:run-through="background"/>
    </style:style>
    <style:style style:name="gr4"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Group 17080" draw:style-name="gr1"><draw:custom-shape draw:name="Rectangle 10" draw:style-name="gr2" draw:text-style-name="P3" svg:width="0.114cm" svg:height="0.516cm" svg:x="2.5cm" svg:y="1.338cm"><text:p text:style-name="P2"><text:span text:style-name="T1"><text:s/></text:span></text:p><draw:enhanced-geometry svg:viewBox="0 0 21600 21600" draw:type="non-primitive" draw:enhanced-path="M 0 0 L 21600 0 21600 21600 0 21600 Z N"/></draw:custom-shape><draw:frame draw:name="Picture 110" draw:style-name="gr3" draw:text-style-name="P4" svg:width="3.412cm" svg:height="3.068cm" svg:x="0.092cm" svg:y="0.318cm"><draw:image xlink:href="Pictures/10000000000000C8000000B4546B3A76.jpg" xlink:type="simple" xlink:show="embed" xlink:actuate="onLoad" draw:mime-type="image/jpeg"><text:p/></draw:image></draw:frame></draw:g><draw:frame draw:style-name="fr1" draw:name="Picture 112" text:anchor-type="as-char" svg:y="0cm" svg:width="7.752cm" style:rel-width="scale" svg:height="2.566cm" style:rel-height="scale" draw:z-index="2"><draw:image xlink:href="Pictures/10000000000001DA0000009D9504392C.jpg" xlink:type="simple" xlink:show="embed" xlink:actuate="onLoad" draw:mime-type="image/jpeg"/></draw:frame></text:p>
      <text:p text:style-name="P5"><text:span text:style-name="Default_20_Paragraph_20_Font"><text:span text:style-name="T2"/></text:span></text:p>
      <text:p text:style-name="P6"><text:span text:style-name="Default_20_Paragraph_20_Font"><text:span text:style-name="T3">EXAMEN UNIDAD II </text:span></text:span></text:p>
      <text:p text:style-name="P7">Sistema: Reysa UI – Sistema de Gestión para Taller Automotriz <text:s/></text:p>
      <text:p text:style-name="P7">Nombre de la materia: Interacción Humano Máquina </text:p>
      <text:p text:style-name="P8">Institución: Universidad Autónoma de Baja California Sur (UABCS) </text:p>
      <text:p text:style-name="P9">Profesor: <text:span text:style-name="Default_20_Paragraph_20_Font"><text:span text:style-name="T4">IVAN ALEXIS COTA ESPINOSA</text:span></text:span> </text:p>
      <text:p text:style-name="P7">Alumno: <text:span text:style-name="T5">Francisco Javier Geraldo Geraldo</text:span></text:p>
      <text:p text:style-name="P10">Fecha de entrega: 7/05/2026 </text:p>
      <text:p text:style-name="P10"/>
      <text:h text:style-name="P11" text:outline-level="1">Introducción </text:h>
      <text:p text:style-name="P12"><text:span text:style-name="T6">Actualmente</text:span> los sistemas digitales son utilizados en la mayoría de los negocios para mejorar la organización y administración de información. En los talleres automotrices es importante llevar un control de clientes, vehículos, órdenes y reservas para evitar errores y mejorar la atención. </text:p>
      <text:p text:style-name="P12">El presente proyecto consiste en el desarrollo de “Reysa UI”, un sistema diseñado para la gestión de un taller automotriz. El sistema fue desarrollado en Figma mediante un prototipo de alta fidelidad, aplicando conceptos de Interacción Humano Computadora (IHC), diseño de interfaz (UI) y experiencia de usuario (UX). </text:p>
      <text:p text:style-name="P13">El objetivo principal del sistema es facilitar la administración de vehículos y clientes mediante una interfaz sencilla, organizada y fácil de utilizar. Durante el desarrollo se aplicaron conceptos vistos en clase como recopilación de requerimientos, casos de uso, perfiles de usuario y leyes de diseño enfocadas en el usuario. </text:p>
      <text:h text:style-name="P11" text:outline-level="1"><text:soft-page-break/>Objetivo del Proyecto </text:h>
      <text:p text:style-name="P13">Desarrollar un sistema digital para la administración de un taller automotriz aplicando conceptos de Interacción Humano Computadora con el fin de mejorar la organización de información y la experiencia del usuario. </text:p>
      <text:p text:style-name="P14"><text:span text:style-name="Default_20_Paragraph_20_Font"><text:span text:style-name="T7"><text:s/></text:span></text:span></text:p>
      <text:p text:style-name="P15"><text:span text:style-name="Default_20_Paragraph_20_Font"><text:span text:style-name="T7"><text:s/></text:span></text:span></text:p>
      <text:h text:style-name="P16" text:outline-level="1">Técnicas de Recopilación e Interpretación de Requerimientos </text:h>
      <text:h text:style-name="P17" text:outline-level="2">Técnica utilizada </text:h>
      <text:p text:style-name="P12">Para el desarrollo del sistema se utilizó la técnica de entrevista para recopilar requerimientos. Esta técnica fue seleccionada porque permite obtener información directa sobre las necesidades y problemas que existen dentro de un taller automotriz. </text:p>
      <text:p text:style-name="P18">La entrevista ayuda a comprender cómo trabajan los usuarios y qué funciones son necesarias dentro del sistema. Además, permite identificar problemas en los procesos actuales y conocer qué información necesita manejar el usuario. </text:p>
      <text:h text:style-name="P17" text:outline-level="2">Justificación </text:h>
      <text:p text:style-name="P12">Se eligió la entrevista porque permite hacer preguntas más específicas y obtener respuestas detalladas. Gracias a esto fue posible identificar las funciones principales del sistema y la forma en que los usuarios interactúan con la información. </text:p>
      <text:p text:style-name="P19">Durante la recopilación de información se analizaron aspectos como: </text:p>
      <text:list text:style-name="L1">
        <text:list-item>
          <text:p text:style-name="P20">Registro de clientes. </text:p>
        </text:list-item>
        <text:list-item>
          <text:p text:style-name="P20">Control de vehículos. </text:p>
        </text:list-item>
        <text:list-item>
          <text:p text:style-name="P20">Estados de reparación. </text:p>
        </text:list-item>
        <text:list-item>
          <text:p text:style-name="P20"><text:soft-page-break/>Gestión de reservas. </text:p>
        </text:list-item>
        <text:list-item>
          <text:p text:style-name="P21">Organización del trabajo dentro del taller. </text:p>
        </text:list-item>
      </text:list>
      <text:h text:style-name="P17" text:outline-level="2">Aplicación de la técnica </text:h>
      <text:p text:style-name="P22">La entrevista se realizó considerando el entorno de un taller automotriz. A partir de la información obtenida se definieron los módulos principales del sistema: </text:p>
      <text:list text:style-name="L2">
        <text:list-item>
          <text:p text:style-name="P23">Login. </text:p>
        </text:list-item>
        <text:list-item>
          <text:p text:style-name="P23">Tablero principal. </text:p>
        </text:list-item>
        <text:list-item>
          <text:p text:style-name="P23">Vehículos. </text:p>
        </text:list-item>
        <text:list-item>
          <text:p text:style-name="P23">Clientes. </text:p>
        </text:list-item>
        <text:list-item>
          <text:p text:style-name="P24">Reservas. </text:p>
        </text:list-item>
      </text:list>
      <text:p text:style-name="P18">También se identificó la necesidad de utilizar colores y etiquetas para mostrar el estado de cada vehículo y facilitar la interpretación visual. </text:p>
      <text:h text:style-name="P17" text:outline-level="2">Interpretación de resultados </text:h>
      <text:p text:style-name="P12">Los resultados obtenidos permitieron diseñar un sistema enfocado en la facilidad de uso y organización visual. Se determinó que el sistema debía permitir acceso rápido a la información y una navegación sencilla para mejorar el trabajo diario dentro del taller. </text:p>
      <text:p text:style-name="P15"><text:s/></text:p>
      <text:p text:style-name="P25"><text:span text:style-name="Default_20_Paragraph_20_Font"><text:span text:style-name="T8"><draw:g text:anchor-type="as-char" draw:z-index="1" draw:name="Group 19057" draw:style-name="gr4"><draw:frame draw:name="Picture 838" draw:style-name="gr3" draw:text-style-name="P4" svg:width="9.947cm" svg:height="7.092cm" svg:x="0cm" svg:y="0cm"><draw:image xlink:href="Pictures/10000000000003790000027B120BBAAE.jpg" xlink:type="simple" xlink:show="embed" xlink:actuate="onLoad" draw:mime-type="image/jpeg"><text:p/></draw:image></draw:frame><draw:frame draw:name="Picture 840" draw:style-name="gr3" draw:text-style-name="P4" svg:width="10.053cm" svg:height="7.092cm" svg:x="10.742cm" svg:y="0cm"><draw:image xlink:href="Pictures/100000000000037700000273D49AC99B.jpg" xlink:type="simple" xlink:show="embed" xlink:actuate="onLoad" draw:mime-type="image/jpeg"><text:p/></draw:image></draw:frame><draw:custom-shape draw:name="Rectangle 995" draw:style-name="gr2" draw:text-style-name="P3" svg:width="0.301cm" svg:height="1.013cm" svg:x="2.143cm" svg:y="0.901cm"><text:p text:style-name="P2"><text:span text:style-name="T7"><text:s/></text:span></text:p><draw:enhanced-geometry svg:viewBox="0 0 21600 21600" draw:type="non-primitive" draw:enhanced-path="M 0 0 L 21600 0 21600 21600 0 21600 Z N"/></draw:custom-shape><draw:custom-shape draw:name="Rectangle 996" draw:style-name="gr2" draw:text-style-name="P3" svg:width="0.301cm" svg:height="1.013cm" svg:x="2.143cm" svg:y="3.147cm"><text:p text:style-name="P2"><text:span text:style-name="T7"><text:s/></text:span></text:p><draw:enhanced-geometry svg:viewBox="0 0 21600 21600" draw:type="non-primitive" draw:enhanced-path="M 0 0 L 21600 0 21600 21600 0 21600 Z N"/></draw:custom-shape><draw:custom-shape draw:name="Rectangle 997" draw:style-name="gr2" draw:text-style-name="P3" svg:width="0.301cm" svg:height="1.013cm" svg:x="2.143cm" svg:y="5.392cm"><text:p text:style-name="P2"><text:span text:style-name="T7"><text:s/></text:span></text:p><draw:enhanced-geometry svg:viewBox="0 0 21600 21600" draw:type="non-primitive" draw:enhanced-path="M 0 0 L 21600 0 21600 21600 0 21600 Z N"/></draw:custom-shape></draw:g></text:span></text:span></text:p>
      <text:p text:style-name="P14"><text:span text:style-name="Default_20_Paragraph_20_Font"><text:span text:style-name="T7"><text:s/></text:span></text:span></text:p>
      <text:p text:style-name="P15"><text:soft-page-break/><text:span text:style-name="Default_20_Paragraph_20_Font"><text:span text:style-name="T7"><text:s/></text:span></text:span></text:p>
      <text:h text:style-name="P26" text:outline-level="1">Casos de Uso </text:h>
      <text:h text:style-name="P17" text:outline-level="2">Caso de Uso 1: Iniciar sesión </text:h>
      <text:p text:style-name="P27"><text:span text:style-name="Default_20_Paragraph_20_Font"><text:span text:style-name="T9">Actor:</text:span></text:span> Empleado </text:p>
      <text:p text:style-name="P19"><text:s/><text:span text:style-name="Default_20_Paragraph_20_Font"><text:span text:style-name="T9">Descripción:</text:span></text:span> Permite ingresar al sistema mediante usuario y contraseña </text:p>
      <text:p text:style-name="P28"><draw:frame draw:style-name="fr2" draw:name="Picture 1005" text:anchor-type="paragraph" svg:x="3.069cm" svg:y="-0.243cm" svg:width="10.451cm" style:rel-width="scale" svg:height="7.408cm" style:rel-height="scale" draw:z-index="3"><draw:image xlink:href="Pictures/100000000000037700000274AFAC750F.jpg" xlink:type="simple" xlink:show="embed" xlink:actuate="onLoad" draw:mime-type="image/jpeg"/></draw:frame>. </text:p>
      <text:p text:style-name="P29"><text:span text:style-name="Default_20_Paragraph_20_Font"><text:span text:style-name="T10"><text:s/></text:span></text:span></text:p>
      <text:p text:style-name="P29"><text:span text:style-name="Default_20_Paragraph_20_Font"><text:span text:style-name="T10"><text:s/></text:span></text:span></text:p>
      <text:p text:style-name="P29"><text:span text:style-name="Default_20_Paragraph_20_Font"><text:span text:style-name="T10"><text:s/></text:span></text:span></text:p>
      <text:p text:style-name="P29"><text:span text:style-name="Default_20_Paragraph_20_Font"><text:span text:style-name="T10"><text:s/></text:span></text:span></text:p>
      <text:p text:style-name="P29"><text:span text:style-name="Default_20_Paragraph_20_Font"><text:span text:style-name="T10"><text:s/></text:span></text:span></text:p>
      <text:h text:style-name="P30" text:outline-level="3">Flujo principal </text:h>
      <text:list text:style-name="L3">
        <text:list-item>
          <text:p text:style-name="P31">El usuario abre el sistema. </text:p>
        </text:list-item>
        <text:list-item>
          <text:p text:style-name="P31">Ingresa sus datos. </text:p>
        </text:list-item>
        <text:list-item>
          <text:p text:style-name="P31">Presiona el botón de acceso. </text:p>
        </text:list-item>
        <text:list-item>
          <text:p text:style-name="P31">El sistema valida la información. </text:p>
        </text:list-item>
        <text:list-item>
          <text:p text:style-name="P32">El usuario entra al tablero principal. </text:p>
        </text:list-item>
      </text:list>
      <text:p text:style-name="P33"><text:span text:style-name="Default_20_Paragraph_20_Font"><text:span text:style-name="T10">Flujo alterno </text:span></text:span></text:p>
      <text:p text:style-name="P34">● El sistema muestra un error si los datos son incorrectos. </text:p>
      <text:h text:style-name="P17" text:outline-level="2">Caso de Uso 2: Ver tablero </text:h>
      <text:p text:style-name="P27"><text:span text:style-name="Default_20_Paragraph_20_Font"><text:span text:style-name="T9">Actor:</text:span></text:span> Administrador </text:p>
      <text:p text:style-name="P35"><text:s/><text:span text:style-name="Default_20_Paragraph_20_Font"><text:span text:style-name="T9">Descripción:</text:span></text:span> Permite visualizar información general del sistema. </text:p>
      <text:p text:style-name="P36"><text:soft-page-break/><draw:frame draw:style-name="fr1" draw:name="Picture 1162" text:anchor-type="as-char" svg:y="0cm" svg:width="8.811cm" style:rel-width="scale" svg:height="6.244cm" style:rel-height="scale" draw:z-index="4"><draw:image xlink:href="Pictures/1000000000000436000002FA9AC9518A.jpg" xlink:type="simple" xlink:show="embed" xlink:actuate="onLoad" draw:mime-type="image/jpeg"/></draw:frame></text:p>
      <text:h text:style-name="P30" text:outline-level="3">Flujo principal </text:h>
      <text:list text:style-name="L4">
        <text:list-item>
          <text:p text:style-name="P37">El usuario accede al tablero. </text:p>
        </text:list-item>
        <text:list-item>
          <text:p text:style-name="P38">El sistema muestra datos y accesos rápidos. </text:p>
        </text:list-item>
      </text:list>
      <text:h text:style-name="P17" text:outline-level="2">Caso de Uso 3: Gestionar vehículos </text:h>
      <text:p text:style-name="P27"><text:span text:style-name="Default_20_Paragraph_20_Font"><text:span text:style-name="T9">Actor:</text:span></text:span> Encargado </text:p>
      <text:p text:style-name="P39"><text:s/><text:span text:style-name="Default_20_Paragraph_20_Font"><text:span text:style-name="T9">Descripción:</text:span></text:span> Permite visualizar y administrar vehículos registrados. </text:p>
      <text:p text:style-name="P40"><draw:frame draw:style-name="fr1" draw:name="Picture 1164" text:anchor-type="as-char" svg:y="0cm" svg:width="10.716cm" style:rel-width="scale" svg:height="7.673cm" style:rel-height="scale" draw:z-index="5"><draw:image xlink:href="Pictures/10000000000003790000027B120BBAAE.jpg" xlink:type="simple" xlink:show="embed" xlink:actuate="onLoad" draw:mime-type="image/jpeg"/></draw:frame></text:p>
      <text:h text:style-name="P30" text:outline-level="3">Flujo principal </text:h>
      <text:list text:style-name="L5">
        <text:list-item>
          <text:p text:style-name="P41">El usuario entra al módulo Vehículos. </text:p>
        </text:list-item>
        <text:list-item>
          <text:p text:style-name="P41">El sistema muestra la lista de vehículos. </text:p>
        </text:list-item>
        <text:list-item>
          <text:p text:style-name="P42">El usuario revisa estados e información. </text:p>
        </text:list-item>
      </text:list>
      <text:h text:style-name="P17" text:outline-level="2"><text:soft-page-break/>Caso de Uso 4: Registrar cliente </text:h>
      <text:p text:style-name="P27"><text:span text:style-name="Default_20_Paragraph_20_Font"><text:span text:style-name="T9">Actor:</text:span></text:span> Recepcionista </text:p>
      <text:p text:style-name="P39"><text:s/><text:span text:style-name="Default_20_Paragraph_20_Font"><text:span text:style-name="T9">Descripción:</text:span></text:span> Permite agregar clientes al sistema. </text:p>
      <text:p text:style-name="P43"><draw:frame draw:style-name="fr1" draw:name="Picture 1264" text:anchor-type="as-char" svg:y="0cm" svg:width="10.716cm" style:rel-width="scale" svg:height="7.435cm" style:rel-height="scale" draw:z-index="6"><draw:image xlink:href="Pictures/10000000000002DD000002A055561836.jpg" xlink:type="simple" xlink:show="embed" xlink:actuate="onLoad" draw:mime-type="image/jpeg"/></draw:frame></text:p>
      <text:h text:style-name="P30" text:outline-level="3">Flujo principal </text:h>
      <text:list text:style-name="L6">
        <text:list-item>
          <text:p text:style-name="P44">El usuario entra al módulo Clientes. </text:p>
        </text:list-item>
        <text:list-item>
          <text:p text:style-name="P44">Selecciona “Nuevo Cliente”. </text:p>
        </text:list-item>
        <text:list-item>
          <text:p text:style-name="P44">Llena el formulario. </text:p>
        </text:list-item>
        <text:list-item>
          <text:p text:style-name="P45">Guarda la información. </text:p>
        </text:list-item>
      </text:list>
      <text:p text:style-name="P46"><text:span text:style-name="Default_20_Paragraph_20_Font"><text:span text:style-name="T11"><text:s/></text:span></text:span></text:p>
      <text:p text:style-name="P15"><text:span text:style-name="Default_20_Paragraph_20_Font"><text:span text:style-name="T11"><text:s/></text:span></text:span></text:p>
      <text:h text:style-name="P17" text:outline-level="2">Caso de Uso 5: Crear reserva </text:h>
      <text:p text:style-name="P27"><text:span text:style-name="Default_20_Paragraph_20_Font"><text:span text:style-name="T9">Actor:</text:span></text:span> Recepcionista </text:p>
      <text:p text:style-name="P39"><text:s/><text:span text:style-name="Default_20_Paragraph_20_Font"><text:span text:style-name="T9">Descripción:</text:span></text:span> Permite registrar una reserva. </text:p>
      <text:p text:style-name="P40"><text:soft-page-break/><draw:frame draw:style-name="fr1" draw:name="Picture 1398" text:anchor-type="as-char" svg:y="0cm" svg:width="10.716cm" style:rel-width="scale" svg:height="7.594cm" style:rel-height="scale" draw:z-index="7"><draw:image xlink:href="Pictures/1000000000000376000002745D8FE709.jpg" xlink:type="simple" xlink:show="embed" xlink:actuate="onLoad" draw:mime-type="image/jpeg"/></draw:frame></text:p>
      <text:p text:style-name="P47"><text:s/></text:p>
      <text:h text:style-name="P30" text:outline-level="3">Flujo principal </text:h>
      <text:list text:style-name="L7">
        <text:list-item>
          <text:p text:style-name="P48">El usuario entra al módulo Reservas. </text:p>
        </text:list-item>
        <text:list-item>
          <text:p text:style-name="P48">Selecciona fecha y horario. </text:p>
        </text:list-item>
        <text:list-item>
          <text:p text:style-name="P49">Guarda la reserva. </text:p>
        </text:list-item>
      </text:list>
      <text:h text:style-name="P26" text:outline-level="1">Escenarios de Uso </text:h>
      <text:h text:style-name="P17" text:outline-level="2">Escenario 1: Inicio de sesión </text:h>
      <text:p text:style-name="P27"><text:span text:style-name="Default_20_Paragraph_20_Font"><text:span text:style-name="T9">Contexto:</text:span></text:span> El empleado necesita entrar al sistema. </text:p>
      <text:p text:style-name="P27"><text:s/><text:span text:style-name="Default_20_Paragraph_20_Font"><text:span text:style-name="T9">Actor:</text:span></text:span> Empleado </text:p>
      <text:p text:style-name="P27"><text:s/><text:span text:style-name="Default_20_Paragraph_20_Font"><text:span text:style-name="T9">Objetivo:</text:span></text:span> Acceder al sistema. </text:p>
      <text:p text:style-name="P27"><text:s/><text:span text:style-name="Default_20_Paragraph_20_Font"><text:span text:style-name="T9">Disparador:</text:span></text:span> Inicio de jornada laboral. </text:p>
      <text:p text:style-name="P27"><text:s/><text:span text:style-name="Default_20_Paragraph_20_Font"><text:span text:style-name="T9">Flujo principal:</text:span></text:span> El usuario ingresa sus datos y entra al sistema. </text:p>
      <text:p text:style-name="P27"><text:s/><text:span text:style-name="Default_20_Paragraph_20_Font"><text:span text:style-name="T9">Excepciones:</text:span></text:span> Contraseña incorrecta. </text:p>
      <text:p text:style-name="P50"><text:s/><text:span text:style-name="Default_20_Paragraph_20_Font"><text:span text:style-name="T9">Criterio de éxito:</text:span></text:span> Acceso correcto al sistema. </text:p>
      <text:h text:style-name="P17" text:outline-level="2">Escenario 2: Revisar vehículos pendientes </text:h>
      <text:p text:style-name="P27"><text:span text:style-name="Default_20_Paragraph_20_Font"><text:span text:style-name="T9">Contexto:</text:span></text:span> El encargado revisa órdenes pendientes. </text:p>
      <text:p text:style-name="P27"><text:s/><text:span text:style-name="Default_20_Paragraph_20_Font"><text:span text:style-name="T9">Actor:</text:span></text:span> Encargado </text:p>
      <text:p text:style-name="P27"><text:soft-page-break/><text:s/><text:span text:style-name="Default_20_Paragraph_20_Font"><text:span text:style-name="T9">Objetivo:</text:span></text:span> Consultar vehículos en espera. </text:p>
      <text:p text:style-name="P27"><text:s/><text:span text:style-name="Default_20_Paragraph_20_Font"><text:span text:style-name="T9">Disparador:</text:span></text:span> Necesidad de revisar el trabajo pendiente. </text:p>
      <text:p text:style-name="P27"><text:s/><text:span text:style-name="Default_20_Paragraph_20_Font"><text:span text:style-name="T9">Flujo principal:</text:span></text:span> Accede a Vehículos y revisa estados. </text:p>
      <text:p text:style-name="P27"><text:s/><text:span text:style-name="Default_20_Paragraph_20_Font"><text:span text:style-name="T9">Excepciones:</text:span></text:span> No existen registros. </text:p>
      <text:p text:style-name="P50"><text:s/><text:span text:style-name="Default_20_Paragraph_20_Font"><text:span text:style-name="T9">Criterio de éxito:</text:span></text:span> Información mostrada correctamente. </text:p>
      <text:h text:style-name="P17" text:outline-level="2">Escenario 3: Registrar cliente </text:h>
      <text:p text:style-name="P27"><text:span text:style-name="Default_20_Paragraph_20_Font"><text:span text:style-name="T9">Contexto:</text:span></text:span> Un cliente solicita servicio. </text:p>
      <text:p text:style-name="P27"><text:s/><text:span text:style-name="Default_20_Paragraph_20_Font"><text:span text:style-name="T9">Actor:</text:span></text:span> Recepcionista </text:p>
      <text:p text:style-name="P27"><text:s/><text:span text:style-name="Default_20_Paragraph_20_Font"><text:span text:style-name="T9">Objetivo:</text:span></text:span> Registrar información del cliente. </text:p>
      <text:p text:style-name="P27"><text:s/><text:span text:style-name="Default_20_Paragraph_20_Font"><text:span text:style-name="T9">Disparador:</text:span></text:span> Llegada de cliente nuevo. </text:p>
      <text:p text:style-name="P27"><text:s/><text:span text:style-name="Default_20_Paragraph_20_Font"><text:span text:style-name="T9">Flujo principal:</text:span></text:span> Se llena formulario y se guarda información. </text:p>
      <text:p text:style-name="P27"><text:s/><text:span text:style-name="Default_20_Paragraph_20_Font"><text:span text:style-name="T9">Excepciones:</text:span></text:span> Campos vacíos. </text:p>
      <text:p text:style-name="P50"><text:s/><text:span text:style-name="Default_20_Paragraph_20_Font"><text:span text:style-name="T9">Criterio de éxito:</text:span></text:span> Cliente registrado. </text:p>
      <text:h text:style-name="P17" text:outline-level="2">Escenario 4: Actualizar estado de vehículo </text:h>
      <text:p text:style-name="P27"><text:span text:style-name="Default_20_Paragraph_20_Font"><text:span text:style-name="T9">Contexto:</text:span></text:span> El servicio del vehículo terminó. </text:p>
      <text:p text:style-name="P27"><text:s/><text:span text:style-name="Default_20_Paragraph_20_Font"><text:span text:style-name="T9">Actor:</text:span></text:span> Encargado </text:p>
      <text:p text:style-name="P27"><text:s/><text:span text:style-name="Default_20_Paragraph_20_Font"><text:span text:style-name="T9">Objetivo:</text:span></text:span> Cambiar estado del vehículo. </text:p>
      <text:p text:style-name="P27"><text:s/><text:span text:style-name="Default_20_Paragraph_20_Font"><text:span text:style-name="T9">Disparador:</text:span></text:span> Reparación finalizada. </text:p>
      <text:p text:style-name="P27"><text:s/><text:span text:style-name="Default_20_Paragraph_20_Font"><text:span text:style-name="T9">Flujo principal:</text:span></text:span> Se selecciona el vehículo y se actualiza estado. </text:p>
      <text:p text:style-name="P27"><text:s/><text:span text:style-name="Default_20_Paragraph_20_Font"><text:span text:style-name="T9">Excepciones:</text:span></text:span> Error de actualización. </text:p>
      <text:p text:style-name="P27"><text:s/><text:span text:style-name="Default_20_Paragraph_20_Font"><text:span text:style-name="T9">Criterio de éxito:</text:span></text:span> Estado actualizado correctamente. </text:p>
      <text:h text:style-name="P17" text:outline-level="2">Escenario 5: Registrar reserva </text:h>
      <text:p text:style-name="P27"><text:span text:style-name="Default_20_Paragraph_20_Font"><text:span text:style-name="T9">Contexto:</text:span></text:span> Un cliente agenda cita. </text:p>
      <text:p text:style-name="P27"><text:s/><text:span text:style-name="Default_20_Paragraph_20_Font"><text:span text:style-name="T9">Actor:</text:span></text:span> Recepcionista </text:p>
      <text:p text:style-name="P27"><text:s/><text:span text:style-name="Default_20_Paragraph_20_Font"><text:span text:style-name="T9">Objetivo:</text:span></text:span> Registrar una reserva. </text:p>
      <text:p text:style-name="P27"><text:s/><text:span text:style-name="Default_20_Paragraph_20_Font"><text:span text:style-name="T9">Disparador:</text:span></text:span> Solicitud de cita. </text:p>
      <text:p text:style-name="P27"><text:s/><text:span text:style-name="Default_20_Paragraph_20_Font"><text:span text:style-name="T9">Flujo principal:</text:span></text:span> Se selecciona fecha y se guarda información. </text:p>
      <text:p text:style-name="P27"><text:s/><text:span text:style-name="Default_20_Paragraph_20_Font"><text:span text:style-name="T9">Excepciones:</text:span></text:span> Horario ocupado. </text:p>
      <text:p text:style-name="P51"><text:s/><text:span text:style-name="Default_20_Paragraph_20_Font"><text:span text:style-name="T9">Criterio de éxito:</text:span></text:span> Reserva registrada correctamente. </text:p>
      <text:h text:style-name="P26" text:outline-level="1"><text:soft-page-break/>Proceso de Análisis </text:h>
      <text:h text:style-name="P17" text:outline-level="2">Usuarios objetivo </text:h>
      <text:p text:style-name="P18">El sistema está dirigido a empleados y administradores de talleres automotrices que necesitan controlar información de clientes y vehículos. </text:p>
      <text:p text:style-name="P52"><text:span text:style-name="Default_20_Paragraph_20_Font"><text:span text:style-name="T11">Objetivos del usuario </text:span></text:span></text:p>
      <text:p text:style-name="P50">Los usuarios buscan organizar la información y reducir errores administrativos. </text:p>
      <text:p text:style-name="P52"><text:span text:style-name="Default_20_Paragraph_20_Font"><text:span text:style-name="T11">Necesidades </text:span></text:span></text:p>
      <text:p text:style-name="P50">Los usuarios necesitan un sistema rápido, sencillo y fácil de entender. </text:p>
      <text:p text:style-name="P52"><text:span text:style-name="Default_20_Paragraph_20_Font"><text:span text:style-name="T11">Problemas actuales </text:span></text:span></text:p>
      <text:p text:style-name="P50">El uso de registros manuales puede generar pérdida de información y desorganización. </text:p>
      <text:p text:style-name="P15"><text:span text:style-name="Default_20_Paragraph_20_Font"><text:span text:style-name="T11"><text:s/></text:span></text:span></text:p>
      <text:h text:style-name="P17" text:outline-level="2">Contexto de uso </text:h>
      <text:p text:style-name="P18">El sistema será utilizado dentro del taller mediante computadoras de escritorio o laptops. </text:p>
      <text:h text:style-name="P17" text:outline-level="2">Tareas principales </text:h>
      <text:list text:style-name="L8">
        <text:list-item>
          <text:p text:style-name="P53">Iniciar sesión. </text:p>
        </text:list-item>
        <text:list-item>
          <text:p text:style-name="P53">Registrar clientes. </text:p>
        </text:list-item>
        <text:list-item>
          <text:p text:style-name="P53">Gestionar vehículos. </text:p>
        </text:list-item>
        <text:list-item>
          <text:p text:style-name="P54">Crear reservas. </text:p>
        </text:list-item>
      </text:list>
      <text:h text:style-name="P17" text:outline-level="2">Requerimientos de información </text:h>
      <text:p text:style-name="P19">El sistema debe almacenar: </text:p>
      <text:list text:style-name="L9">
        <text:list-item>
          <text:p text:style-name="P55"><text:soft-page-break/>Datos del cliente. </text:p>
        </text:list-item>
        <text:list-item>
          <text:p text:style-name="P55">Datos del vehículo. </text:p>
        </text:list-item>
        <text:list-item>
          <text:p text:style-name="P55">Estado del servicio. </text:p>
        </text:list-item>
        <text:list-item>
          <text:p text:style-name="P56">Información de reservas. </text:p>
        </text:list-item>
      </text:list>
      <text:p text:style-name="P52"><text:span text:style-name="Default_20_Paragraph_20_Font"><text:span text:style-name="T11">Prioridades </text:span></text:span></text:p>
      <text:p text:style-name="P50">Las funciones principales son la gestión de vehículos y clientes. </text:p>
      <text:p text:style-name="P52"><text:span text:style-name="Default_20_Paragraph_20_Font"><text:span text:style-name="T11">Restricciones </text:span></text:span></text:p>
      <text:p text:style-name="P51">El sistema debe mantener una interfaz simple y organizada. </text:p>
      <text:p text:style-name="P15"><text:span text:style-name="Default_20_Paragraph_20_Font"><text:span text:style-name="T7"><text:s/></text:span></text:span></text:p>
      <text:h text:style-name="P57" text:outline-level="1">Requerimientos Funcionales y No Funcionales </text:h>
      <text:h text:style-name="P17" text:outline-level="2">Módulos del sistema </text:h>
      <text:list text:style-name="L10">
        <text:list-item>
          <text:p text:style-name="P58">Login </text:p>
        </text:list-item>
        <text:list-item>
          <text:p text:style-name="P58">Tablero </text:p>
        </text:list-item>
        <text:list-item>
          <text:p text:style-name="P58">Vehículos </text:p>
        </text:list-item>
        <text:list-item>
          <text:p text:style-name="P58">Clientes </text:p>
        </text:list-item>
        <text:list-item>
          <text:p text:style-name="P59">Reservas </text:p>
        </text:list-item>
      </text:list>
      <text:h text:style-name="P60" text:outline-level="2">Requerimientos Funcionales </text:h>
      <text:h text:style-name="P30" text:outline-level="3">Login </text:h>
      <text:p text:style-name="P27">RF-01: El sistema debe permitir iniciar sesión. </text:p>
      <text:p text:style-name="P27"><text:s/>RF-02: El sistema debe validar credenciales. </text:p>
      <text:p text:style-name="P61"><text:s/>RF-03: El sistema debe mostrar errores de acceso. </text:p>
      <text:h text:style-name="P30" text:outline-level="3"><text:soft-page-break/>Vehículos </text:h>
      <text:p text:style-name="P27">RF-04: El sistema debe mostrar vehículos registrados. </text:p>
      <text:p text:style-name="P27"><text:s/>RF-05: El sistema debe permitir cambiar estados. </text:p>
      <text:p text:style-name="P61"><text:s/>RF-06: El sistema debe organizar vehículos por categoría. </text:p>
      <text:h text:style-name="P30" text:outline-level="3">Clientes </text:h>
      <text:p text:style-name="P27">RF-07: El sistema debe registrar clientes. </text:p>
      <text:p text:style-name="P27"><text:s/>RF-08: El sistema debe editar información. </text:p>
      <text:p text:style-name="P61"><text:s/>RF-09: El sistema debe mostrar lista de clientes. </text:p>
      <text:h text:style-name="P30" text:outline-level="3">Reservas </text:h>
      <text:p text:style-name="P27">RF-10: El sistema debe registrar reservas. </text:p>
      <text:p text:style-name="P27"><text:s/>RF-11: El sistema debe mostrar fechas disponibles. </text:p>
      <text:p text:style-name="P50"><text:s/>RF-12: El sistema debe modificar reservas. </text:p>
      <text:h text:style-name="P17" text:outline-level="2">Requerimientos No Funcionales </text:h>
      <text:p text:style-name="P27">RNF-01: El sistema debe ser fácil de usar. </text:p>
      <text:p text:style-name="P27"><text:s/>RNF-02: El sistema debe cargar rápidamente. </text:p>
      <text:p text:style-name="P27"><text:s/>RNF-03: El sistema debe mantener consistencia visual. </text:p>
      <text:p text:style-name="P51"><text:s/>RNF-04: El sistema debe reducir errores de usuario. </text:p>
      <text:h text:style-name="P26" text:outline-level="1">Perfil de Usuario </text:h>
      <text:h text:style-name="P17" text:outline-level="2">Perfil 1: Recepcionista </text:h>
      <text:p text:style-name="P27"><text:span text:style-name="Default_20_Paragraph_20_Font"><text:span text:style-name="T9">Descripción:</text:span></text:span> Encargado de atender clientes. </text:p>
      <text:p text:style-name="P27"><text:s/><text:span text:style-name="Default_20_Paragraph_20_Font"><text:span text:style-name="T9">Necesidades:</text:span></text:span> Registrar información rápidamente. </text:p>
      <text:p text:style-name="P27"><text:s/><text:span text:style-name="Default_20_Paragraph_20_Font"><text:span text:style-name="T9">Objetivos:</text:span></text:span> Organizar clientes y reservas. </text:p>
      <text:p text:style-name="P50"><text:s/><text:span text:style-name="Default_20_Paragraph_20_Font"><text:span text:style-name="T9">Problemas que resuelve:</text:span></text:span> Reduce desorden administrativo. </text:p>
      <text:h text:style-name="P17" text:outline-level="2"><text:soft-page-break/>Perfil 2: Encargado de taller </text:h>
      <text:p text:style-name="P27"><text:span text:style-name="Default_20_Paragraph_20_Font"><text:span text:style-name="T9">Descripción:</text:span></text:span> Supervisa vehículos y órdenes. </text:p>
      <text:p text:style-name="P27"><text:s/><text:span text:style-name="Default_20_Paragraph_20_Font"><text:span text:style-name="T9">Necesidades:</text:span></text:span> Revisar estados de vehículos. </text:p>
      <text:p text:style-name="P27"><text:s/><text:span text:style-name="Default_20_Paragraph_20_Font"><text:span text:style-name="T9">Objetivos:</text:span></text:span> Mejorar organización del trabajo. </text:p>
      <text:p text:style-name="P50"><text:s/><text:span text:style-name="Default_20_Paragraph_20_Font"><text:span text:style-name="T9">Problemas que resuelve:</text:span></text:span> Facilita seguimiento de reparaciones. </text:p>
      <text:h text:style-name="P17" text:outline-level="2">Perfil 3: Administrador </text:h>
      <text:p text:style-name="P27"><text:span text:style-name="Default_20_Paragraph_20_Font"><text:span text:style-name="T9">Descripción:</text:span></text:span> Responsable general del sistema. </text:p>
      <text:p text:style-name="P27"><text:s/><text:span text:style-name="Default_20_Paragraph_20_Font"><text:span text:style-name="T9">Necesidades:</text:span></text:span> Supervisar información. </text:p>
      <text:p text:style-name="P27"><text:s/><text:span text:style-name="Default_20_Paragraph_20_Font"><text:span text:style-name="T9">Objetivos:</text:span></text:span> Mejorar control del taller. </text:p>
      <text:p text:style-name="P51"><text:s/><text:span text:style-name="Default_20_Paragraph_20_Font"><text:span text:style-name="T9">Problemas que resuelve:</text:span></text:span> Centraliza información. </text:p>
      <text:h text:style-name="P62" text:outline-level="1">Diseño de Interfaz (UI) </text:h>
      <text:p text:style-name="P12">El sistema fue diseñado en Figma utilizando una estructura tipo dashboard. Se utilizaron colores oscuros y elementos claros para mejorar el contraste visual y facilitar la lectura de información. </text:p>
      <text:p text:style-name="P12">El menú lateral permite navegar rápidamente entre módulos como Vehículos, Clientes y Reservas. Además, se utilizaron etiquetas de colores para representar el estado de cada vehículo. </text:p>
      <text:p text:style-name="P13">La interfaz mantiene consistencia visual en botones, tipografía y distribución de elementos. </text:p>
      <text:h text:style-name="P62" text:outline-level="1">Experiencia de Usuario (UX) </text:h>
      <text:p text:style-name="P12">La experiencia de usuario fue diseñada para facilitar la navegación y reducir el tiempo necesario para realizar tareas dentro del sistema. </text:p>
      <text:p text:style-name="P12">El usuario puede acceder rápidamente a los módulos principales mediante el menú lateral. Además, la organización visual permite identificar fácilmente estados y acciones importantes. </text:p>
      <text:p text:style-name="P13"><text:soft-page-break/>Los formularios mantienen una estructura sencilla para evitar errores y mejorar la facilidad de uso. </text:p>
      <text:p text:style-name="P15"><text:span text:style-name="Default_20_Paragraph_20_Font"><text:span text:style-name="T7"><text:s/></text:span></text:span></text:p>
      <text:h text:style-name="P26" text:outline-level="1">Aplicación de Conceptos de IHC </text:h>
      <text:h text:style-name="P17" text:outline-level="2">Psicología en UX/UI </text:h>
      <text:p text:style-name="P18">El sistema organiza la información mediante tarjetas y colores para facilitar la comprensión visual. </text:p>
      <text:h text:style-name="P17" text:outline-level="2">Ley de Hick </text:h>
      <text:p text:style-name="P18">Se redujo la cantidad de opciones visibles para facilitar la toma de decisiones del usuario. </text:p>
      <text:p text:style-name="P52"><text:span text:style-name="Default_20_Paragraph_20_Font"><text:span text:style-name="T11">Ley de Fitts </text:span></text:span></text:p>
      <text:p text:style-name="P50">Los botones principales son visibles y fáciles de seleccionar. </text:p>
      <text:p text:style-name="P52"><text:span text:style-name="Default_20_Paragraph_20_Font"><text:span text:style-name="T11">Ley de Jakob </text:span></text:span></text:p>
      <text:p text:style-name="P50">La interfaz utiliza un diseño similar a otros sistemas administrativos conocidos. </text:p>
      <text:h text:style-name="P60" text:outline-level="2">Leyes Gestalt </text:h>
      <text:p text:style-name="P33"><text:span text:style-name="Default_20_Paragraph_20_Font"><text:span text:style-name="T10">Proximidad </text:span></text:span></text:p>
      <text:p text:style-name="P61">Los elementos relacionados se agrupan visualmente. </text:p>
      <text:p text:style-name="P33"><text:span text:style-name="Default_20_Paragraph_20_Font"><text:span text:style-name="T10">Similitud </text:span></text:span></text:p>
      <text:p text:style-name="P61">Los botones y módulos utilizan estilos similares. </text:p>
      <text:p text:style-name="P33"><text:span text:style-name="Default_20_Paragraph_20_Font"><text:span text:style-name="T10">Cierre </text:span></text:span></text:p>
      <text:p text:style-name="P27"><text:soft-page-break/>Los contenedores ayudan a identificar secciones independientes. </text:p>
      <text:h text:style-name="P63" text:outline-level="1">Prototipado en Figma </text:h>
      <text:p text:style-name="P12">El sistema fue prototipado en Figma mediante pantallas de alta fidelidad conectadas entre sí para simular navegación real. </text:p>
      <text:p text:style-name="P19">El prototipo incluye: </text:p>
      <text:list text:style-name="L11">
        <text:list-item>
          <text:p text:style-name="P64">Login </text:p>
        </text:list-item>
        <text:list-item>
          <text:p text:style-name="P64">Tablero </text:p>
        </text:list-item>
        <text:list-item>
          <text:p text:style-name="P64">Vehículos </text:p>
        </text:list-item>
        <text:list-item>
          <text:p text:style-name="P64">Clientes </text:p>
        </text:list-item>
        <text:list-item>
          <text:p text:style-name="P65">Reservas </text:p>
        </text:list-item>
      </text:list>
      <text:p text:style-name="P22">También se utilizaron componentes y estilos reutilizables para mantener consistencia visual. </text:p>
      <text:p text:style-name="P66"><draw:frame draw:style-name="fr1" draw:name="Picture 3147" text:anchor-type="as-char" svg:y="0cm" svg:width="16.166cm" style:rel-width="scale" svg:height="8.89cm" style:rel-height="scale" draw:z-index="8"><draw:image xlink:href="Pictures/1000000000000545000002E7F7463373.jpg" xlink:type="simple" xlink:show="embed" xlink:actuate="onLoad" draw:mime-type="image/jpeg"/></draw:frame></text:p>
      <text:p text:style-name="P46"><text:span text:style-name="Default_20_Paragraph_20_Font"><text:span text:style-name="T11"><text:s/></text:span></text:span></text:p>
      <text:p text:style-name="P15"><text:span text:style-name="Default_20_Paragraph_20_Font"><text:span text:style-name="T11"><text:s/></text:span></text:span></text:p>
      <text:h text:style-name="P17" text:outline-level="2">Link de Figma </text:h>
      <text:p text:style-name="P27">https://www.figma.com/design/9oUAdEGjwCVNV2eb30NwT8/Reysa-UI?node-id=19-46</text:p>
      <text:p text:style-name="P51"><text:soft-page-break/>&amp;p=f&amp;m=draw </text:p>
      <text:h text:style-name="P11" text:outline-level="1">Conclusión </text:h>
      <text:p text:style-name="P27">El desarrollo de Reysa UI permitió aplicar conceptos de Interacción Humano </text:p>
      <text:p text:style-name="P12">Computadora mediante la creación de un sistema enfocado en la organización visual y facilidad de uso. </text:p>
      <text:p text:style-name="P12">Durante el proyecto se aplicaron principios de UX/UI, análisis de usuario y leyes de diseño para mejorar la navegación y reducir errores dentro del sistema. </text:p>
      <text:p text:style-name="P12">El resultado final es un prototipo funcional desarrollado en Figma que facilita la administración de un taller automotriz mediante una interfaz clara y organizada. </text:p>
      <text:p text:style-name="P67"><text:s/></text:p>
      <text:p text:style-name="P67"><text:s/></text:p>
      <text:p text:style-name="P67"><text:s/></text:p>
      <text:p text:style-name="P67"><text:s/></text:p>
      <text:p text:style-name="P67"><text:s/></text:p>
      <text:p text:style-name="P67"><text:s/></text:p>
      <text:p text:style-name="P67"><text:s/></text:p>
      <text:p text:style-name="P67"><text:s/></text:p>
      <text:p text:style-name="P1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441cm" style:contextual-spacing="false" fo:line-height="109%" fo:keep-together="always" fo:hyphenation-ladder-count="no-limit" fo:hyphenation-keep="auto" loext:hyphenation-keep-type="column" loext:hyphenation-keep-line="false" fo:text-indent="-0.018cm" style:auto-text-indent="false" fo:keep-with-next="always">
        <style:tab-stops/>
      </style:paragraph-properties>
      <style:text-properties fo:color="#000000" loext:opacity="100%" style:font-name="Arial" fo:font-family="Arial" style:font-family-generic="swiss" style:font-pitch="variable" fo:font-size="23pt" fo:font-weight="bold" style:font-name-asian="Arial" style:font-family-asian="Arial" style:font-family-generic-asian="swiss" style:font-pitch-asian="variable" style:font-size-asian="23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547cm" style:contextual-spacing="false" fo:keep-together="always" fo:hyphenation-ladder-count="no-limit" fo:hyphenation-keep="auto" loext:hyphenation-keep-type="column" loext:hyphenation-keep-line="false" fo:text-indent="-0.018cm" style:auto-text-indent="false" fo:keep-with-next="always">
        <style:tab-stops/>
      </style:paragraph-properties>
      <style:text-properties fo:color="#000000" loext:opacity="100%" style:font-name="Arial" fo:font-family="Arial" style:font-family-generic="swiss" style:font-pitch="variable" fo:font-size="17pt" fo:font-weight="bold" style:font-name-asian="Arial" style:font-family-asian="Arial" style:font-family-generic-asian="swiss" style:font-pitch-asian="variable" style:font-size-asian="17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018cm" fo:margin-top="0cm" fo:margin-bottom="0.612cm" style:contextual-spacing="false" fo:keep-together="always" fo:hyphenation-ladder-count="no-limit" fo:hyphenation-keep="auto" loext:hyphenation-keep-type="column" loext:hyphenation-keep-line="false" fo:text-indent="-0.018cm" style:auto-text-indent="false" fo:keep-with-next="always">
        <style:tab-stops/>
      </style:paragraph-properties>
      <style:text-properties fo:color="#000000" loext:opacity="100%"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top="0cm" fo:margin-bottom="0.194cm" style:contextual-spacing="false" fo:line-height="110%" fo:hyphenation-ladder-count="no-limit" fo:hyphenation-keep="auto" loext:hyphenation-keep-type="column" loext:hyphenation-keep-line="false" fo:text-indent="-0.018cm"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3_20_Char" style:display-name="Heading 3 Char" style:family="text">
      <style:text-properties fo:color="#000000" loext:opacity="100%"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2_20_Char" style:display-name="Heading 2 Char" style:family="text">
      <style:text-properties fo:color="#000000" loext:opacity="100%" style:font-name="Arial" fo:font-family="Arial" style:font-family-generic="swiss" style:font-pitch="variable" fo:font-size="17pt" fo:font-weight="bold" style:font-name-asian="Arial" style:font-family-asian="Arial" style:font-family-generic-asian="swiss" style:font-pitch-asian="variable" style:font-size-asian="17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23pt" fo:font-weight="bold" style:font-name-asian="Arial" style:font-family-asian="Arial" style:font-family-generic-asian="swiss" style:font-pitch-asian="variable" style:font-size-asian="23pt" style:font-weight-asian="bold" style:font-name-complex="Arial" style:font-family-complex="Arial" style:font-family-generic-complex="swiss" style:font-pitch-complex="variable"/>
    </style:style>
    <style:style style:name="WW_5f_CharOUTLINELVL1" style:display-name="WW_CharOUTLINELVL1"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2" style:display-name="WW_CharLFO12LVL2"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3" style:display-name="WW_CharLFO12LVL3"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5" style:display-name="WW_CharLFO12LVL5"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6" style:display-name="WW_CharLFO12LVL6"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8" style:display-name="WW_CharLFO12LVL8"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WW_5f_CharLFO12LVL9" style:display-name="WW_CharLFO12LVL9" style:family="text">
      <style:text-properties fo:color="#000000" loext:opacity="100%" style:text-line-through-style="none" style:text-line-through-type="none" style:text-position="0% 100%" style:font-name="Arial" fo:font-family="Arial" style:font-family-generic="swiss" style:font-pitch="variable" fo:font-size="23pt" fo:font-style="normal" style:text-underline-style="none" fo:font-weight="bold" fo:background-color="transparent" style:font-name-asian="Arial" style:font-family-asian="Arial" style:font-family-generic-asian="swiss" style:font-pitch-asian="variable" style:font-size-asian="23pt" style:font-style-asian="normal" style:font-weight-asian="bold" style:font-name-complex="Arial" style:font-family-complex="Arial" style:font-family-generic-complex="swiss" style:font-pitch-complex="variable" style:font-size-complex="23pt" style:font-weight-complex="bold"/>
    </style:style>
    <style:style style:name="Graphics" style:family="graphic">
      <style:graphic-properties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318cm" fo:margin-bottom="2.5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a46b460d1686bb49c718d2ef5f88b83ff2dc4981</meta:generator>
    <dc:title>EXAMEN UNIDAD II</dc:title>
    <dc:subject/>
    <meta:initial-creator>word</meta:initial-creator>
    <meta:creation-date>2026-05-07T19:58:00Z</meta:creation-date>
    <dc:date>2026-05-07T13:17:51.640833204</dc:date>
    <meta:editing-cycles>3</meta:editing-cycles>
    <meta:editing-duration>PT4M52S</meta:editing-duration>
    <meta:document-statistic meta:table-count="0" meta:image-count="7" meta:object-count="0" meta:page-count="15" meta:paragraph-count="263" meta:word-count="1588" meta:character-count="11287" meta:non-whitespace-character-count="9675"/>
    <meta:template xlink:type="simple" xlink:actuate="onRequest" xlink:title="" xlink:href="../../../../Descargas/EXAMEN-UNIDAD-II-DE.odt/Normal"/>
  </office:meta>
</office:document-meta>
</file>